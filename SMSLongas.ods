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5.96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lanilha1" table:style-name="ta1">
        <table:table-column table:style-name="co1" table:default-cell-style-name="ce1"/>
        <table:table-column table:style-name="co2" table:default-cell-style-name="Default"/>
        <table:table-row table:style-name="ro1">
          <table:table-cell office:value-type="string" calcext:value-type="string">
            <text:p>numero</text:p>
          </table:table-cell>
          <table:table-cell office:value-type="string" calcext:value-type="string">
            <text:p>texto</text:p>
          </table:table-cell>
        </table:table-row>
        <table:table-row table:style-name="ro2">
          <table:table-cell office:value-type="string" calcext:value-type="string">
            <text:p>+5511941302204</text:p>
          </table:table-cell>
          <table:table-cell office:value-type="string" calcext:value-type="string">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p/>
          </table:table-cell>
        </table:table-row>
        <table:table-row table:style-name="ro1">
          <table:table-cell office:value-type="string" calcext:value-type="string">
            <text:p>+5511941302204</text:p>
          </table:table-cell>
          <table:table-cell office:value-type="string" calcext:value-type="string">
            <text:p>Ola Monari temos uma oferta de refinanciamento do seu empréstimo com taxa menores. Acesse: <text:a xlink:href="https://bityli.com/6JpVQ" xlink:type="simple">https://bityli.com/6JpVQ</text:a> ou ligue: 0800 776 8000 para mais informações!  </text:p>
          </table:table-cell>
        </table:table-row>
        <table:table-row table:style-name="ro2">
          <table:table-cell office:value-type="string" calcext:value-type="string">
            <text:p>+5511941302204</text:p>
          </table:table-cell>
          <table:table-cell office:value-type="string" calcext:value-type="string">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p/>
          </table:table-cell>
        </table:table-row>
        <table:table-row table:style-name="ro1">
          <table:table-cell office:value-type="string" calcext:value-type="string">
            <text:p>+5511941302204</text:p>
          </table:table-cell>
          <table:table-cell office:value-type="string" calcext:value-type="string">
            <text:p>Ola Monari temos uma oferta de refinanciamento do seu empréstimo com taxa menores. Acesse: <text:a xlink:href="https://bityli.com/6JpVQ" xlink:type="simple">https://bityli.com/6JpVQ</text:a> ou ligue: 0800 776 8000 para mais informações!  </text:p>
          </table:table-cell>
        </table:table-row>
        <table:table-row table:style-name="ro1" table:number-rows-repeated="1048570">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6">00/00/0000</text:date>, <text:time style:data-style-name="N2" text:time-value="13:06:40.8408305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12:27:18.804012783</meta:creation-date>
    <dc:date>2021-07-26T16:58:18.603008084</dc:date>
    <meta:editing-duration>PT3H47M21S</meta:editing-duration>
    <meta:editing-cycles>11</meta:editing-cycles>
    <meta:generator>LibreOffice/6.4.7.2$Linux_X86_64 LibreOffice_project/40$Build-2</meta:generator>
    <meta:document-statistic meta:table-count="1" meta:cell-count="10" meta:object-count="0"/>
  </office:meta>
</office:document-meta>
</file>